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Infrastructure Overview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— pve01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Host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Assessment: 2026-05-29T02:05:00Z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enerated</text:p>
          </table:table-cell>
          <table:table-cell table:style-name="ce_auto" office:value-type="string" fo:wrap-option="wrap">
            <text:p>2026-05-31T14:09:51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</text:p>
          </table:table-cell>
          <table:table-cell table:style-name="ce_auto" office:value-type="string" fo:wrap-option="wrap">
            <text:p>18.3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free=412.8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
local-zfs (zfspool): total=412.8 GB  free=160.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VM 100 (infra-bootstrap): running  cores=4  mem=8192 MB
VM 101 (forgejo): running  cores=2  mem=4096 MB
VM 102 (inventory): running  cores=2  mem=2048 MB
VM 103 (assessment-engine): running  cores=2  mem=4096 M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4 VM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verall Readines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style-name="ce_label" office:value-type="string">
            <text:p>Single Points of Failure</text:p>
          </table:table-cell>
          <table:table-cell table:style-name="ce_derived" office:value-type="string" fo:wrap-option="wrap">
            <text:p>pve01 (Proxmox 8.2-1)
rpool (ZFS mirror, 412.8 GB free)
vmbr0 (bridge, 192.168.1.10/24)
forgejo (VM 101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covery Blocke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store Sequence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store Sequence (Generated from Dependency Graph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style-name="ce_label" office:value-type="string">
            <text:p>Total Estimated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Sum of per-wave estimates — actual time varies</text:p>
          </table:table-cell>
        </table:table-row>
        <table:table-row table:style-name="ro_normal">
          <table:table-cell table:style-name="ce_label" office:value-type="string">
            <text:p>Total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1 — Physical host — must be restored firs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9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No prerequisites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2 — Storage layer — must be available before VMs can star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5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3 — Restore 2 component(s) — no mutual dependenci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4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4 — Restore: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5 — Restore: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, inventory (VM 102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Component Detail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Component Recovery Details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pve01 (Proxmox 8.2-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host:pve01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host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pool (ZFS mirror, 412.8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ol Name</text:p>
          </table:table-cell>
          <table:table-cell table:style-name="ce_auto" office:value-type="string" fo:wrap-option="wrap">
            <text:p>r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pology</text:p>
          </table:table-cell>
          <table:table-cell table:style-name="ce_auto" office:value-type="string" fo:wrap-option="wrap">
            <text:p>mirro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916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e</text:p>
          </table:table-cell>
          <table:table-cell table:style-name="ce_auto" office:value-type="string" fo:wrap-option="wrap">
            <text:p>ONL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vices</text:p>
          </table:table-cell>
          <table:table-cell table:style-name="ce_auto" office:value-type="string" fo:wrap-option="wrap">
            <text:p>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rpool (ZFS mirror, 412.8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 (dir, 44.1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di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50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4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 (dir, 44.1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-zfs (zfspool, 160.4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-zf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160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-zfs (zfspool, 160.4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br0 (bridge, 192.168.1.10/2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networ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 Name</text:p>
          </table:table-cell>
          <table:table-cell table:style-name="ce_auto" office:value-type="string" fo:wrap-option="wrap">
            <text:p>vmbr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rts</text:p>
          </table:table-cell>
          <table:table-cell table:style-name="ce_auto" office:value-type="string" fo:wrap-option="wrap">
            <text:p>['enp2s0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ddresses</text:p>
          </table:table-cell>
          <table:table-cell table:style-name="ce_auto" office:value-type="string" fo:wrap-option="wrap">
            <text:p>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 Aware</text:p>
          </table:table-cell>
          <table:table-cell table:style-name="ce_auto" office:value-type="string" fo:wrap-option="wrap">
            <text:p>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fra-bootstrap (VM 100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2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fra-bootstrap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819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2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fra-bootstrap (VM 100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orgejo (VM 10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forgej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9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Run manual backup or verify schedule</text:p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1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vento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20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3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ventory (VM 102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vm:assessment-engine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3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assessment-eng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5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assessment-engine (VM 103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covery Readines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Readiness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omponent Scor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host:pve01</text:p>
          </table:table-cell>
          <table:table-cell/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2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  <table:table-cell/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1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vm:assessment-engine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aps Requiring Attention (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 —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forgejo (VM 101) —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Run manual backup or verify schedule  |  Impact: Recovery point may not meet RPO</text:p>
          </table:table-cell>
        </table:table-row>
        <table:table-row table:style-name="ro_normal">
          <table:table-cell table:style-name="ce_label" office:value-type="string">
            <text:p>forgejo (VM 101) —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assessment-engine (VM 103) —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ingle Points of Failu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8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2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 During Recove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cident start ti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when recovery was initiated</text:p>
          </table:table-cell>
        </table:table-row>
        <table:table-row table:style-name="ro_normal">
          <table:table-cell table:style-name="ce_label" office:value-type="string">
            <text:p>Affected component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List components confirmed as failed</text:p>
          </table:table-cell>
        </table:table-row>
        <table:table-row table:style-name="ro_normal">
          <table:table-cell table:style-name="ce_label" office:value-type="string">
            <text:p>Recovery decision maker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Name of person authorising recovery</text:p>
          </table:table-cell>
        </table:table-row>
        <table:table-row table:style-name="ro_normal">
          <table:table-cell table:style-name="ce_label" office:value-type="string">
            <text:p>KeePass database availa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KeePass database is accessible</text:p>
          </table:table-cell>
        </table:table-row>
        <table:table-row table:style-name="ro_normal">
          <table:table-cell table:style-name="ce_label" office:value-type="string">
            <text:p>Physical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physical host access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14:09:51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ode</text:p>
          </table:table-cell>
          <table:table-cell table:style-name="ce_auto" office:value-type="string" fo:wrap-option="wrap">
            <text:p>recove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raph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Nodes</text:p>
          </table:table-cell>
          <table:table-cell table:style-name="ce_derived" office:value-type="string" fo:wrap-option="wrap">
            <text:p>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dges</text:p>
          </table:table-cell>
          <table:table-cell table:style-name="ce_derived" office:value-type="string" fo:wrap-option="wrap">
            <text:p>1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stimated Total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eadiness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REEN</text:p>
          </table:table-cell>
          <table:table-cell table:style-name="Default" office:value-type="string" fo:wrap-option="wrap">
            <text:p>6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YELLOW</text:p>
          </table:table-cell>
          <table:table-cell table:style-name="Default" office:value-type="string" fo:wrap-option="wrap">
            <text:p>3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
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/>
  <office:body>
    <office:text>
      <text:p text:style-name="Heading1">Recovery Runbook</text:p>
      <text:p text:style-name="BodyText">Host: pve01  |  Proxmox 8.2-1  |  Assessment: 2026-05-29T02:05:00Z</text:p>
      <text:p text:style-name="BodyText">Generated: 2026-05-31 14:09:51 UTC (2026-05-31 08:09:51 MDT)</text:p>
      <text:p text:style-name="BodyText">Overall Readiness: ⚠ YELLOW  — 3 component(s) with minor gaps</text:p>
      <text:p text:style-name="BodyText"/>
      <text:p text:style-name="BodyText">This runbook is generated from observed infrastructure state. Commands are pre-populated from the assessment. Fields marked [HUMAN] require operator input at recovery time.</text:p>
      <text:p text:style-name="BodyText">Methodology: Observe → Decide → Act → Record → Validate</text:p>
      <text:p text:style-name="BodyText"/>
      <text:p text:style-name="BodyText">Restore sequence: 5 wave(s), estimated 220 minutes total.</text:p>
      <text:p text:style-name="BodyText"/>
      <text:p text:style-name="Heading1">Pre-Recovery Checklist</text:p>
      <text:p text:style-name="BodyText">Complete all items before beginning restore operations.</text:p>
      <text:p text:style-name="BodyText"/>
      <text:p text:style-name="Heading2">Step 0 — Obtain Bootstrap State</text:p>
      <text:p text:style-name="BodyText">Bootstrap state (bootstrap-state.json, Cloud-Init snippets, registries) is required before any VM can be provisioned. Retrieve it now, before touching the Proxmox host.</text:p>
      <text:p text:style-name="BodyText"/>
      <text:p text:style-name="FieldUnresolved">[UNRESOLVED]  External backup: NOT CONFIGURED</text:p>
      <text:p text:style-name="Note">       ↳ No external backup was set up for this cell. bootstrap-state.json must be obtained from another source.</text:p>
      <text:p text:style-name="BodyText">Possible sources: operator's local copy, another cell that held a documentation mirror, or manual reconstruction using known values.</text:p>
      <text:p text:style-name="Checkbox">☐  [HUMAN] bootstrap-state.json obtained from alternative source</text:p>
      <text:p text:style-name="BodyText"/>
      <text:p text:style-name="Heading2">Physical Access and Credentials</text:p>
      <text:p text:style-name="Checkbox">☐  Physical access to host 'pve01' confirmed</text:p>
      <text:p text:style-name="Checkbox">☐  IPMI / out-of-band management accessible (if required)</text:p>
      <text:p text:style-name="FieldHuman">[HUMAN]  Root password: [HUMAN] Retrieve from KeePass</text:p>
      <text:p text:style-name="Note">       ↳ Retrieve root password before starting</text:p>
      <text:p text:style-name="Checkbox">☐  Root password retrieved from KeePass</text:p>
      <text:p text:style-name="Checkbox">☐  KeePass database accessible on recovery device</text:p>
      <text:p text:style-name="BodyText"/>
      <text:p text:style-name="Heading2">Backup Media</text:p>
      <text:p text:style-name="FieldHuman">[HUMAN]  Backup source: [HUMAN] Confirm backup location</text:p>
      <text:p text:style-name="Note">       ↳ PBS server address, NFS share, or physical media location</text:p>
      <text:p text:style-name="Checkbox">☐  Backup storage accessible and mounts successfully</text:p>
      <text:p text:style-name="Checkbox">☐  Target backup verified present (check timestamps)</text:p>
      <text:p text:style-name="BodyText"/>
      <text:p text:style-name="Heading2">Network</text:p>
      <text:p text:style-name="FieldAuto">[AUTO]  Expected gateway: 192.168.1.1</text:p>
      <text:p text:style-name="FieldAuto">[AUTO]  Expected DNS: 1.1.1.1, 8.8.8.8</text:p>
      <text:p text:style-name="Checkbox">☐  Network access from recovery environment confirmed</text:p>
      <text:p text:style-name="BodyText"/>
      <text:p text:style-name="Heading2">Recovery Decision</text:p>
      <text:p text:style-name="FieldHuman">[HUMAN]  Incident start time: [HUMAN]</text:p>
      <text:p text:style-name="Note">       ↳ Record when recovery was initiated</text:p>
      <text:p text:style-name="FieldHuman">[HUMAN]  Decision maker: [HUMAN]</text:p>
      <text:p text:style-name="Note">       ↳ Name of person authorising recovery</text:p>
      <text:p text:style-name="FieldHuman">[HUMAN]  Affected components: [HUMAN]</text:p>
      <text:p text:style-name="Note">       ↳ List confirmed failed components</text:p>
      <text:p text:style-name="FieldHuman">[HUMAN]  Target recovery point: [HUMAN]</text:p>
      <text:p text:style-name="Note">       ↳ Which backup date/time to restore to</text:p>
      <text:p text:style-name="BodyText"/>
      <text:p text:style-name="Heading1">Restore Sequence</text:p>
      <text:p text:style-name="BodyText">Restore waves are ordered by dependency. Each wave's prerequisites must be complete before the wave begins.</text:p>
      <text:p text:style-name="BodyText"/>
      <text:p text:style-name="Heading2">Wave 1 — Physical host — must be restored first</text:p>
      <text:p text:style-name="BodyText">Estimated time: 90 minutes</text:p>
      <text:p text:style-name="BodyText"/>
      <text:p text:style-name="Heading3">pve01 (Proxmox 8.2-1)  [⚠ YELLOW]</text:p>
      <text:p text:style-name="Checkbox">☐  Prerequisites for pve01 (Proxmox 8.2-1) confirmed complete</text:p>
      <text:p text:style-name="BodyText"/>
      <text:p text:style-name="Code"># Restore Proxmox host: pve01</text:p>
      <text:p text:style-name="Code"># Target version: Proxmox VE 8.2-1</text:p>
      <text:p text:style-name="Code"># 1. Boot from Proxmox ISO</text:p>
      <text:p text:style-name="Code"># 2. Install to same disk layout</text:p>
      <text:p text:style-name="Code"># 3. Restore ZFS pool from backup</text:p>
      <text:p text:style-name="Code"># 4. Restore /etc from backup or reconfigure</text:p>
      <text:p text:style-name="Code"># 5. Verify: ssh root@pve01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pve01 (Proxmox 8.2-1)</text:p>
      <text:p text:style-name="BodyText"/>
      <text:p text:style-name="Heading3">Validate: pve01 (Proxmox 8.2-1)</text:p>
      <text:p text:style-name="Code">ssh root@pve01</text:p>
      <text:p text:style-name="BodyText">Expected: login succeeds, Proxmox banner displayed</text:p>
      <text:p text:style-name="Code">pveversion -v</text:p>
      <text:p text:style-name="BodyText">Expected: version string matches pre-failure version</text:p>
      <text:p text:style-name="Checkbox">☐  Host accessible via SSH</text:p>
      <text:p text:style-name="Checkbox">☐  Proxmox web UI accessible</text:p>
      <text:p text:style-name="BodyText"/>
      <text:p text:style-name="Heading2">Wave 2 — Storage layer — must be available before VMs can start</text:p>
      <text:p text:style-name="BodyText">Estimated time: 50 minutes</text:p>
      <text:p text:style-name="BodyText"/>
      <text:p text:style-name="Heading3">local (dir, 44.1 GB free)  [✓ GREEN]</text:p>
      <text:p text:style-name="Note">ℹ  Prerequisites: pve01 (Proxmox 8.2-1)</text:p>
      <text:p text:style-name="Checkbox">☐  Prerequisites for local (dir, 44.1 GB free) confirmed complete</text:p>
      <text:p text:style-name="BodyText"/>
      <text:p text:style-name="Code"># Restore ZFS pool: local</text:p>
      <text:p text:style-name="Code"># Topology: mirror  Devices: (check lsblk)</text:p>
      <text:p text:style-name="Code">zpool import local</text:p>
      <text:p text:style-name="Code"># Or if pool needs recreation:</text:p>
      <text:p text:style-name="Code"># zpool create local mirror </text:p>
      <text:p text:style-name="Code">zpool status loca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 (dir, 44.1 GB free)</text:p>
      <text:p text:style-name="BodyText"/>
      <text:p text:style-name="Heading3">Validate: local (dir, 44.1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local-zfs (zfspool, 160.4 GB free)  [✓ GREEN]</text:p>
      <text:p text:style-name="Note">ℹ  Prerequisites: pve01 (Proxmox 8.2-1)</text:p>
      <text:p text:style-name="Checkbox">☐  Prerequisites for local-zfs (zfspool, 160.4 GB free) confirmed complete</text:p>
      <text:p text:style-name="BodyText"/>
      <text:p text:style-name="Code"># Restore ZFS pool: local-zfs</text:p>
      <text:p text:style-name="Code"># Topology: mirror  Devices: (check lsblk)</text:p>
      <text:p text:style-name="Code">zpool import local-zfs</text:p>
      <text:p text:style-name="Code"># Or if pool needs recreation:</text:p>
      <text:p text:style-name="Code"># zpool create local-zfs mirror </text:p>
      <text:p text:style-name="Code">zpool status local-zfs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local-zfs (zfspool, 160.4 GB free)</text:p>
      <text:p text:style-name="BodyText"/>
      <text:p text:style-name="Heading3">Validate: local-zfs (zfspool, 160.4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rpool (ZFS mirror, 412.8 GB free)  [✓ GREEN]</text:p>
      <text:p text:style-name="Note">ℹ  Prerequisites: pve01 (Proxmox 8.2-1)</text:p>
      <text:p text:style-name="Checkbox">☐  Prerequisites for rpool (ZFS mirror, 412.8 GB free) confirmed complete</text:p>
      <text:p text:style-name="BodyText"/>
      <text:p text:style-name="Code"># Restore ZFS pool: rpool</text:p>
      <text:p text:style-name="Code"># Topology: mirror  Devices: sda, sdb</text:p>
      <text:p text:style-name="Code">zpool import rpool</text:p>
      <text:p text:style-name="Code"># Or if pool needs recreation:</text:p>
      <text:p text:style-name="Code"># zpool create rpool mirror sda sdb</text:p>
      <text:p text:style-name="Code">zpool status rpool</text:p>
      <text:p text:style-name="Code"># Expected: pool state ONLINE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rpool (ZFS mirror, 412.8 GB free)</text:p>
      <text:p text:style-name="BodyText"/>
      <text:p text:style-name="Heading3">Validate: rpool (ZFS mirror, 412.8 GB free)</text:p>
      <text:p text:style-name="Code">zpool status rpool</text:p>
      <text:p text:style-name="BodyText">Expected: state ONLINE, no errors</text:p>
      <text:p text:style-name="Checkbox">☐  Pool rpool ONLINE</text:p>
      <text:p text:style-name="BodyText"/>
      <text:p text:style-name="Heading3">vmbr0 (bridge, 192.168.1.10/24)  [✓ GREEN]</text:p>
      <text:p text:style-name="Note">ℹ  Prerequisites: pve01 (Proxmox 8.2-1)</text:p>
      <text:p text:style-name="Checkbox">☐  Prerequisites for vmbr0 (bridge, 192.168.1.10/24) confirmed complete</text:p>
      <text:p text:style-name="BodyText"/>
      <text:p text:style-name="Code"># Verify bridge: vmbr0</text:p>
      <text:p text:style-name="Code">ip link show vmbr0</text:p>
      <text:p text:style-name="Code">ip addr show vmbr0</text:p>
      <text:p text:style-name="Code"># Expected address: 192.168.1.10/24</text:p>
      <text:p text:style-name="BodyText"/>
      <text:p text:style-name="FieldUnresolved">[UNRESOLVED]  Backup: Unknown — Tier 2 assessment required</text:p>
      <text:p text:style-name="FieldHuman">[HUMAN]  Restore notes: [HUMAN] Record any component-specific recovery notes</text:p>
      <text:p text:style-name="Note">       ↳ Notes for: vmbr0 (bridge, 192.168.1.10/24)</text:p>
      <text:p text:style-name="BodyText"/>
      <text:p text:style-name="Heading3">Validate: vmbr0 (bridge, 192.168.1.10/24)</text:p>
      <text:p text:style-name="Code">ip link show vmbr0</text:p>
      <text:p text:style-name="Checkbox">☐  Bridge vmbr0 UP</text:p>
      <text:p text:style-name="BodyText"/>
      <text:p text:style-name="Heading2">Wave 3 — Restore 2 component(s) — no mutual dependencies</text:p>
      <text:p text:style-name="BodyText">Estimated time: 40 minutes</text:p>
      <text:p text:style-name="BodyText"/>
      <text:p text:style-name="Heading3">forgejo (VM 101)  [⚠ YELLOW]</text:p>
      <text:p text:style-name="Note">ℹ  Prerequisites: pve01 (Proxmox 8.2-1), rpool (ZFS mirror, 412.8 GB free), vmbr0 (bridge, 192.168.1.10/24)</text:p>
      <text:p text:style-name="Checkbox">☐  Prerequisites for forgejo (VM 101) confirmed complete</text:p>
      <text:p text:style-name="BodyText"/>
      <text:p text:style-name="Code"># Restore vm: forgejo (ID 101)</text:p>
      <text:p text:style-name="Code"># Find backup: ls /path/to/backups/ | grep 101</text:p>
      <text:p text:style-name="Code">qmrestore /path/to/backup/101-latest.vma.zst 101 --storage local-zfs</text:p>
      <text:p text:style-name="Code">qm start 101</text:p>
      <text:p text:style-name="Code"># Verify: qm status 101</text:p>
      <text:p text:style-name="BodyText"/>
      <text:p text:style-name="FieldAuto">[AUTO]  Backup: Present (9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forgejo (VM 101)</text:p>
      <text:p text:style-name="BodyText"/>
      <text:p text:style-name="Heading3">Validate: forgejo (VM 101)</text:p>
      <text:p text:style-name="Code">qm status 101</text:p>
      <text:p text:style-name="BodyText">Expected: status running</text:p>
      <text:p text:style-name="Code">ssh ubuntu@[VM_IP]  # replace with forgejo IP</text:p>
      <text:p text:style-name="BodyText">Expected: login succeeds</text:p>
      <text:p text:style-name="Checkbox">☐  VM 101 running</text:p>
      <text:p text:style-name="Checkbox">☐  SSH to forgejo confirmed</text:p>
      <text:p text:style-name="BodyText"/>
      <text:p text:style-name="Heading3">infra-bootstrap (VM 100)  [✓ GREEN]</text:p>
      <text:p text:style-name="Note">ℹ  Prerequisites: pve01 (Proxmox 8.2-1), rpool (ZFS mirror, 412.8 GB free), vmbr0 (bridge, 192.168.1.10/24)</text:p>
      <text:p text:style-name="Checkbox">☐  Prerequisites for infra-bootstrap (VM 100) confirmed complete</text:p>
      <text:p text:style-name="BodyText"/>
      <text:p text:style-name="Code"># Restore vm: infra-bootstrap (ID 100)</text:p>
      <text:p text:style-name="Code"># Find backup: ls /path/to/backups/ | grep 100</text:p>
      <text:p text:style-name="Code">qmrestore /path/to/backup/100-latest.vma.zst 100 --storage local-zfs</text:p>
      <text:p text:style-name="Code">qm start 100</text:p>
      <text:p text:style-name="Code"># Verify: qm status 100</text:p>
      <text:p text:style-name="BodyText"/>
      <text:p text:style-name="FieldAuto">[AUTO]  Backup: Present (2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fra-bootstrap (VM 100)</text:p>
      <text:p text:style-name="BodyText"/>
      <text:p text:style-name="Heading3">Validate: infra-bootstrap (VM 100)</text:p>
      <text:p text:style-name="Code">qm status 100</text:p>
      <text:p text:style-name="BodyText">Expected: status running</text:p>
      <text:p text:style-name="Code">ssh ubuntu@[VM_IP]  # replace with infra-bootstrap IP</text:p>
      <text:p text:style-name="BodyText">Expected: login succeeds</text:p>
      <text:p text:style-name="Checkbox">☐  VM 100 running</text:p>
      <text:p text:style-name="Checkbox">☐  SSH to infra-bootstrap confirmed</text:p>
      <text:p text:style-name="BodyText"/>
      <text:p text:style-name="Heading2">Wave 4 — Restore: inventory (VM 102)</text:p>
      <text:p text:style-name="BodyText">Estimated time: 20 minutes</text:p>
      <text:p text:style-name="BodyText"/>
      <text:p text:style-name="Heading3">inventory (VM 102)  [✓ GREEN]</text:p>
      <text:p text:style-name="Note">ℹ  Prerequisites: pve01 (Proxmox 8.2-1), rpool (ZFS mirror, 412.8 GB free), vmbr0 (bridge, 192.168.1.10/24), forgejo (VM 101)</text:p>
      <text:p text:style-name="Checkbox">☐  Prerequisites for inventory (VM 102) confirmed complete</text:p>
      <text:p text:style-name="BodyText"/>
      <text:p text:style-name="Code"># Restore vm: inventory (ID 102)</text:p>
      <text:p text:style-name="Code"># Find backup: ls /path/to/backups/ | grep 102</text:p>
      <text:p text:style-name="Code">qmrestore /path/to/backup/102-latest.vma.zst 102 --storage local-zfs</text:p>
      <text:p text:style-name="Code">qm start 102</text:p>
      <text:p text:style-name="Code"># Verify: qm status 102</text:p>
      <text:p text:style-name="BodyText"/>
      <text:p text:style-name="FieldAuto">[AUTO]  Backup: Present (1d)</text:p>
      <text:p text:style-name="FieldAuto">[AUTO]  Restore tested: Yes</text:p>
      <text:p text:style-name="FieldHuman">[HUMAN]  Restore notes: [HUMAN] Record any component-specific recovery notes</text:p>
      <text:p text:style-name="Note">       ↳ Notes for: inventory (VM 102)</text:p>
      <text:p text:style-name="BodyText"/>
      <text:p text:style-name="Heading3">Validate: inventory (VM 102)</text:p>
      <text:p text:style-name="Code">qm status 102</text:p>
      <text:p text:style-name="BodyText">Expected: status running</text:p>
      <text:p text:style-name="Code">ssh ubuntu@[VM_IP]  # replace with inventory IP</text:p>
      <text:p text:style-name="BodyText">Expected: login succeeds</text:p>
      <text:p text:style-name="Checkbox">☐  VM 102 running</text:p>
      <text:p text:style-name="Checkbox">☐  SSH to inventory confirmed</text:p>
      <text:p text:style-name="BodyText"/>
      <text:p text:style-name="Heading2">Wave 5 — Restore: assessment-engine (VM 103)</text:p>
      <text:p text:style-name="BodyText">Estimated time: 20 minutes</text:p>
      <text:p text:style-name="BodyText"/>
      <text:p text:style-name="Heading3">assessment-engine (VM 103)  [⚠ YELLOW]</text:p>
      <text:p text:style-name="Note">ℹ  Prerequisites: pve01 (Proxmox 8.2-1), rpool (ZFS mirror, 412.8 GB free), vmbr0 (bridge, 192.168.1.10/24), forgejo (VM 101), inventory (VM 102)</text:p>
      <text:p text:style-name="Checkbox">☐  Prerequisites for assessment-engine (VM 103) confirmed complete</text:p>
      <text:p text:style-name="BodyText"/>
      <text:p text:style-name="Code"># Restore vm: assessment-engine (ID 103)</text:p>
      <text:p text:style-name="Code"># Find backup: ls /path/to/backups/ | grep 103</text:p>
      <text:p text:style-name="Code">qmrestore /path/to/backup/103-latest.vma.zst 103 --storage local-zfs</text:p>
      <text:p text:style-name="Code">qm start 103</text:p>
      <text:p text:style-name="Code"># Verify: qm status 103</text:p>
      <text:p text:style-name="BodyText"/>
      <text:p text:style-name="FieldAuto">[AUTO]  Backup: Present (1d)</text:p>
      <text:p text:style-name="FieldUnresolved">[UNRESOLVED]  Restore tested: No — unvalidated</text:p>
      <text:p text:style-name="FieldHuman">[HUMAN]  Restore notes: [HUMAN] Record any component-specific recovery notes</text:p>
      <text:p text:style-name="Note">       ↳ Notes for: assessment-engine (VM 103)</text:p>
      <text:p text:style-name="BodyText"/>
      <text:p text:style-name="Heading3">Validate: assessment-engine (VM 103)</text:p>
      <text:p text:style-name="Code">qm status 103</text:p>
      <text:p text:style-name="BodyText">Expected: status running</text:p>
      <text:p text:style-name="Code">ssh ubuntu@[VM_IP]  # replace with assessment-engine IP</text:p>
      <text:p text:style-name="BodyText">Expected: login succeeds</text:p>
      <text:p text:style-name="Checkbox">☐  VM 103 running</text:p>
      <text:p text:style-name="Checkbox">☐  SSH to assessment-engine confirmed</text:p>
      <text:p text:style-name="BodyText"/>
      <text:p text:style-name="Heading1">Post-Recovery Validation</text:p>
      <text:p text:style-name="BodyText">After all waves complete, perform end-to-end validation.</text:p>
      <text:p text:style-name="BodyText"/>
      <text:p text:style-name="Heading2">Infrastructure Check</text:p>
      <text:p text:style-name="Code">qm list</text:p>
      <text:p text:style-name="BodyText">Expected: all expected VMs listed with status running</text:p>
      <text:p text:style-name="Code">zpool status</text:p>
      <text:p text:style-name="BodyText">Expected: all pools ONLINE</text:p>
      <text:p text:style-name="Code">ping -c 3 192.168.1.1</text:p>
      <text:p text:style-name="BodyText">Expected: 3 packets received</text:p>
      <text:p text:style-name="Checkbox">☐  All VMs running</text:p>
      <text:p text:style-name="Checkbox">☐  All ZFS pools healthy</text:p>
      <text:p text:style-name="Checkbox">☐  Network connectivity confirmed</text:p>
      <text:p text:style-name="BodyText"/>
      <text:p text:style-name="Heading2">Re-run Assessment</text:p>
      <text:p text:style-name="BodyText">Run Tier 2 assessment to capture post-recovery state:</text:p>
      <text:p text:style-name="Code">python3 assessment/tier2/assess.py</text:p>
      <text:p text:style-name="BodyText">Compare output to pre-failure assessment to confirm full recovery.</text:p>
      <text:p text:style-name="FieldHuman">[HUMAN]  Post-recovery assessment ID: [HUMAN] Record assessment ID</text:p>
      <text:p text:style-name="Note">       ↳ Record the ID of the post-recovery assessment for audit trail</text:p>
      <text:p text:style-name="Checkbox">☐  Post-recovery assessment complete and state verified</text:p>
      <text:p text:style-name="BodyText"/>
      <text:p text:style-name="Heading1">Appendix A — Dependency Graph</text:p>
      <text:p text:style-name="BodyText">Nodes: 9  |  Edges: 19</text:p>
      <text:p text:style-name="BodyText"/>
      <text:p text:style-name="Heading2">All Nodes</text:p>
      <text:p text:style-name="BodyText">  ⚠ YELLOW  pve01 (Proxmox 8.2-1)  [host]  id=host:pve01</text:p>
      <text:p text:style-name="BodyText">  ✓ GREEN  rpool (ZFS mirror, 412.8 GB free)  [storage]  id=zfs:rpool</text:p>
      <text:p text:style-name="BodyText">  ✓ GREEN  local (dir, 44.1 GB free)  [storage]  id=storage:local</text:p>
      <text:p text:style-name="BodyText">  ✓ GREEN  local-zfs (zfspool, 160.4 GB free)  [storage]  id=storage:local-zfs</text:p>
      <text:p text:style-name="BodyText">  ✓ GREEN  vmbr0 (bridge, 192.168.1.10/24)  [network]  id=net:vmbr0</text:p>
      <text:p text:style-name="BodyText">  ✓ GREEN  infra-bootstrap (VM 100)  [vm]  id=vm:infra-bootstrap</text:p>
      <text:p text:style-name="BodyText">  ⚠ YELLOW  forgejo (VM 101)  [vm]  id=vm:forgejo</text:p>
      <text:p text:style-name="BodyText">  ✓ GREEN  inventory (VM 102)  [vm]  id=vm:inventory</text:p>
      <text:p text:style-name="BodyText">  ⚠ YELLOW  assessment-engine (VM 103)  [vm]  id=vm:assessment-engine</text:p>
      <text:p text:style-name="Heading2">All Dependencies (consumer → provider)</text:p>
      <text:p text:style-name="BodyText">  rpool (ZFS mirror, 412.8 GB free)  →[DEPENDS_ON]→  pve01 (Proxmox 8.2-1)  (runs on host)</text:p>
      <text:p text:style-name="BodyText">  local (dir, 44.1 GB free)  →[DEPENDS_ON]→  pve01 (Proxmox 8.2-1)  (runs on host)</text:p>
      <text:p text:style-name="BodyText">  local-zfs (zfspool, 160.4 GB free)  →[DEPENDS_ON]→  pve01 (Proxmox 8.2-1)  (runs on host)</text:p>
      <text:p text:style-name="BodyText">  vmbr0 (bridge, 192.168.1.10/24)  →[DEPENDS_ON]→  pve01 (Proxmox 8.2-1)  (network infrastructure on host)</text:p>
      <text:p text:style-name="BodyText">  infra-bootstrap (VM 100)  →[DEPENDS_ON]→  pve01 (Proxmox 8.2-1)  (runs on host)</text:p>
      <text:p text:style-name="BodyText">  infra-bootstrap (VM 100)  →[STORAGE]→  rpool (ZFS mirror, 412.8 GB free)  (primary storage)</text:p>
      <text:p text:style-name="BodyText">  infra-bootstrap (VM 100)  →[NETWORK]→  vmbr0 (bridge, 192.168.1.10/24)  (network access)</text:p>
      <text:p text:style-name="BodyText">  forgejo (VM 101)  →[DEPENDS_ON]→  pve01 (Proxmox 8.2-1)  (runs on host)</text:p>
      <text:p text:style-name="BodyText">  forgejo (VM 101)  →[STORAGE]→  rpool (ZFS mirror, 412.8 GB free)  (primary storage)</text:p>
      <text:p text:style-name="BodyText">  forgejo (VM 101)  →[NETWORK]→  vmbr0 (bridge, 192.168.1.10/24)  (network access)</text:p>
      <text:p text:style-name="BodyText">  inventory (VM 102)  →[DEPENDS_ON]→  pve01 (Proxmox 8.2-1)  (runs on host)</text:p>
      <text:p text:style-name="BodyText">  inventory (VM 102)  →[STORAGE]→  rpool (ZFS mirror, 412.8 GB free)  (primary storage)</text:p>
      <text:p text:style-name="BodyText">  inventory (VM 102)  →[NETWORK]→  vmbr0 (bridge, 192.168.1.10/24)  (network access)</text:p>
      <text:p text:style-name="BodyText">  assessment-engine (VM 103)  →[DEPENDS_ON]→  pve01 (Proxmox 8.2-1)  (runs on host)</text:p>
      <text:p text:style-name="BodyText">  assessment-engine (VM 103)  →[STORAGE]→  rpool (ZFS mirror, 412.8 GB free)  (primary storage)</text:p>
      <text:p text:style-name="BodyText">  assessment-engine (VM 103)  →[NETWORK]→  vmbr0 (bridge, 192.168.1.10/24)  (network access)</text:p>
      <text:p text:style-name="BodyText">  assessment-engine (VM 103)  →[NETWORK]→  forgejo (VM 101)  (git remote (assessment repos))</text:p>
      <text:p text:style-name="BodyText">  inventory (VM 102)  →[NETWORK]→  forgejo (VM 101)  (git remote (inventory repo))</text:p>
      <text:p text:style-name="BodyText">  assessment-engine (VM 103)  →[NETWORK]→  inventory (VM 102)  (inventory data)</text:p>
      <text:p text:style-name="BodyText"/>
      <text:p text:style-name="Heading1">Appendix B — Readiness Gaps</text:p>
      <text:p text:style-name="Heading2">pve01 (Proxmox 8.2-1) — UNTESTED_RESTORE</text:p>
      <text:p text:style-name="BodyText">[YELLOW]  Severity: ⚠ YELLOW</text:p>
      <text:p text:style-name="BodyText">Issue: Restore procedure never tested for host:pve01</text:p>
      <text:p text:style-name="BodyText">Fix: Perform restore test to isolated environment</text:p>
      <text:p text:style-name="BodyText">Impact: Restore procedure unvalidated; actual RTO unknown</text:p>
      <text:p text:style-name="Heading2">forgejo (VM 101) — STALE_BACKUP</text:p>
      <text:p text:style-name="BodyText">[YELLOW]  Severity: ⚠ YELLOW</text:p>
      <text:p text:style-name="BodyText">Issue: Backup is 9 days old (threshold: 7 days for vm)</text:p>
      <text:p text:style-name="BodyText">Fix: Run manual backup or verify schedule</text:p>
      <text:p text:style-name="BodyText">Impact: Recovery point may not meet RPO</text:p>
      <text:p text:style-name="Heading2">forgejo (VM 101) — UNTESTED_RESTORE</text:p>
      <text:p text:style-name="BodyText">[YELLOW]  Severity: ⚠ YELLOW</text:p>
      <text:p text:style-name="BodyText">Issue: Restore procedure never tested for vm:forgejo</text:p>
      <text:p text:style-name="BodyText">Fix: Perform restore test to isolated environment</text:p>
      <text:p text:style-name="BodyText">Impact: Restore procedure unvalidated; actual RTO unknown</text:p>
      <text:p text:style-name="Heading2">assessment-engine (VM 103) — UNTESTED_RESTORE</text:p>
      <text:p text:style-name="BodyText">[YELLOW]  Severity: ⚠ YELLOW</text:p>
      <text:p text:style-name="BodyText">Issue: Restore procedure never tested for vm:assessment-engine</text:p>
      <text:p text:style-name="BodyText">Fix: Perform restore test to isolated environment</text:p>
      <text:p text:style-name="BodyText">Impact: Restore procedure unvalidated; actual RTO unkn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 style:class="text">
      <style:paragraph-properties fo:margin-bottom="0.2cm"/>
      <style:text-properties fo:font-size="10pt" fo:font-family="Liberation Sans"/>
    </style:style>
    <style:style style:name="Heading1" style:family="paragraph" style:parent-style-name="Standard">
      <style:paragraph-properties fo:margin-top="0.5cm" fo:margin-bottom="0.3cm" fo:keep-with-next="always"/>
      <style:text-properties fo:font-size="16pt" fo:font-weight="bold" fo:color="#1F3864"/>
    </style:style>
    <style:style style:name="Heading2" style:family="paragraph" style:parent-style-name="Standard">
      <style:paragraph-properties fo:margin-top="0.4cm" fo:margin-bottom="0.2cm" fo:keep-with-next="always" fo:background-color="#D6E4F0"/>
      <style:text-properties fo:font-size="13pt" fo:font-weight="bold" fo:color="#1F3864"/>
    </style:style>
    <style:style style:name="Heading3" style:family="paragraph" style:parent-style-name="Standard">
      <style:paragraph-properties fo:margin-top="0.3cm" fo:margin-bottom="0.1cm"/>
      <style:text-properties fo:font-size="11pt" fo:font-weight="bold" fo:color="#1A5276"/>
    </style:style>
    <style:style style:name="BodyText" style:family="paragraph" style:parent-style-name="Standard">
      <style:paragraph-properties fo:margin-bottom="0.15cm"/>
      <style:text-properties fo:font-size="10pt"/>
    </style:style>
    <style:style style:name="Code" style:family="paragraph" style:parent-style-name="Standard">
      <style:paragraph-properties fo:margin-left="0.5cm" fo:margin-bottom="0.1cm" fo:background-color="#F2F3F4" fo:padding="0.1cm"/>
      <style:text-properties fo:font-size="9pt" fo:font-family="Liberation Mono" style:font-family-generic="modern"/>
    </style:style>
    <style:style style:name="FieldAuto" style:family="paragraph" style:parent-style-name="Standard">
      <style:paragraph-properties fo:margin-left="0.3cm" fo:background-color="#EBF5FB" fo:padding="0.05cm"/>
      <style:text-properties fo:font-size="10pt" fo:color="#1A5276"/>
    </style:style>
    <style:style style:name="FieldDerived" style:family="paragraph" style:parent-style-name="Standard">
      <style:paragraph-properties fo:margin-left="0.3cm" fo:background-color="#EAFAF1" fo:padding="0.05cm"/>
      <style:text-properties fo:font-size="10pt" fo:color="#145A32"/>
    </style:style>
    <style:style style:name="FieldHuman" style:family="paragraph" style:parent-style-name="Standard">
      <style:paragraph-properties fo:margin-left="0.3cm" fo:background-color="#FEFDE7" fo:padding="0.05cm"/>
      <style:text-properties fo:font-size="10pt" fo:color="#7D6608"/>
    </style:style>
    <style:style style:name="FieldUnresolved" style:family="paragraph" style:parent-style-name="Standard">
      <style:paragraph-properties fo:margin-left="0.3cm" fo:background-color="#FDEDEC" fo:padding="0.05cm"/>
      <style:text-properties fo:font-size="10pt" fo:color="#78281F"/>
    </style:style>
    <style:style style:name="Note" style:family="paragraph" style:parent-style-name="Standard">
      <style:paragraph-properties fo:margin-left="0.5cm"/>
      <style:text-properties fo:font-size="9pt" fo:color="#555555" fo:font-style="italic"/>
    </style:style>
    <style:style style:name="Checkbox" style:family="paragraph" style:parent-style-name="Standard">
      <style:paragraph-properties fo:margin-left="0.5cm" fo:background-color="#FFF9C4"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Assessment Engine doc-gen v1.0</meta:generator>
  </office:meta>
</office:document-meta>
</file>